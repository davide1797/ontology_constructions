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987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9.9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5" office:value-type="string" calcext:value-type="string">
            <text:p>Artic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Citation</text:p>
          </table:table-cell>
          <table:table-cell table:style-name="ce5" office:value-type="string" calcext:value-type="string">
            <text:p>Venue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Ontology Learning with Deep Learning: a Case Study on Patient Safety Using PubMed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WAT4L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 Language-Independent Ontology Construction Method Using Tagged Images in Folksonomy</text:p>
          </table:table-cell>
          <table:table-cell table:style-name="ce6"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EEE A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bic ontology learning using deep learning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ternational conference on web intellig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ontology construction using text corpora and ontology design patterns (ODPs) in Alzheimer’s disease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rnal Ilmu Komputer dan Informa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cting ontological knowledge from textual descriptions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ormal Ontology Generation by Deep Machine Learning</text:p>
          </table:table-cell>
          <table:table-cell table:style-name="ce6"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ternational Conference on Ubiquitous Information Technologies and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antic-based lightweight ontology learning framework: a case study of intrusion detection ontology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rnational conference on web intellig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ft linked data miner: Mining OWL 2 EL class expressions directly from online RDF datasets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urnal of Web Seman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construction of e-government services ontology from Arabic webpages</text:p>
          </table:table-cell>
          <table:table-cell office:value-type="string" calcext:value-type="string">
            <text:p>a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cedia Computer Scien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utomatic Ontology Learning from Heterogeneous Relational Databases: Application in Alimentation Risks Field</text:p>
          </table:table-cell>
          <table:table-cell table:style-name="ce6" office:value-type="string" calcext:value-type="string">
            <text:p>a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rnational Conference on Computational Intelligence and Its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relationship extraction from agricultural text for ontology construction</text:p>
          </table:table-cell>
          <table:table-cell office:value-type="string" calcext:value-type="string">
            <text:p>a</text:p>
          </table:table-cell>
          <table:table-cell office:value-type="float" office:value="2018" calcext:value-type="float">
            <text:p>20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formation processing in agricul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sive ontology learning as neural machine translation</text:p>
          </table:table-cell>
          <table:table-cell office:value-type="string" calcext:value-type="string">
            <text:p>a</text:p>
          </table:table-cell>
          <table:table-cell office:value-type="float" office:value="2018" calcext:value-type="float">
            <text:p>20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ournal of Web Seman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ked open data-based framework for automatic biomedical ontology generation</text:p>
          </table:table-cell>
          <table:table-cell office:value-type="string" calcext:value-type="string">
            <text:p>a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MC bioinforma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Learning and Constraint Programming for Relational-To-Ontology Schema Mapping</text:p>
          </table:table-cell>
          <table:table-cell office:value-type="string" calcext:value-type="string">
            <text:p>a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A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odology for automatic ontology generation using database schema information</text:p>
          </table:table-cell>
          <table:table-cell office:value-type="string" calcext:value-type="string">
            <text:p>a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bile Information System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earning Ontology Axioms over Knowledge Graphs via Representation Learning</text:p>
          </table:table-cell>
          <table:table-cell table:style-name="ce6" office:value-type="string" calcext:value-type="string">
            <text:p>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W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n ontology-based learning approach for automatically classifying security requirement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ournal of Systems and Softwa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n ontology-driven multimedia focused crawler based on linked open data and deep learning technique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ltimedia Tools and Application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-driven cross-domain transfer learning</text:p>
          </table:table-cell>
          <table:table-cell table:style-name="ce6" office:value-type="string" calcext:value-type="string">
            <text:p>a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mal Ontology in Information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decision support system for project risk management based on ontology learning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urnal of Computer Information Systems and Industrial Management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novel approach for learning ontology from relational database: from the construction to the evaluation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urnal of Big Data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DOL: a novel framework for automatic domain ontology learning</text:p>
          </table:table-cell>
          <table:table-cell table:style-name="ce6"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 Journal of Supercompu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2Onto: OWL ontology learning approach from couchbase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ligent Systems in Big Data, Semantic Web and Machine Lear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-concept-seeded LDA for ontology learning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cedia Computer Sci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creation model based on attention mechanism for a specific business domain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ternational IOT, Electronics and Mechatronics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learning from relational databases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formation Scien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an automatic approach to the design of a generic ontology for information security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ciling Data Analytics, Automation, Privacy, and Security: A Big Data Challen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grammar-based genetic programming for mining subsumption axioms involving complex class expressions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national Conference on Web Intelligence and Intelligent Agent Technology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 Constructivist Ontology Relation Learning Method</text:p>
          </table:table-cell>
          <table:table-cell table:style-name="ce6" office:value-type="string" calcext:value-type="string">
            <text:p>a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actions on Cyberne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ethod of semi-automated ontology population from multiple semi-structured data sources</text:p>
          </table:table-cell>
          <table:table-cell office:value-type="string" calcext:value-type="string">
            <text:p>a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urnal of information sci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top‐down enriching approach for ontology learning from text</text:p>
          </table:table-cell>
          <table:table-cell office:value-type="string" calcext:value-type="string">
            <text:p>a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urrency and Computation: Practice and Experien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n Automatic Ontology Generation Framework with An Organizational Perspective</text:p>
          </table:table-cell>
          <table:table-cell table:style-name="ce6" office:value-type="string" calcext:value-type="string">
            <text:p>a</text:p>
          </table:table-cell>
          <table:table-cell office:value-type="float" office:value="2022" calcext:value-type="float">
            <text:p>20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ontology learning framework for unstructured arabic text</text:p>
          </table:table-cell>
          <table:table-cell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national Symposium on Innovative Approaches in Smart Technologi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nhancing relevant concepts extraction for ontology learning using domain time relevance</text:p>
          </table:table-cell>
          <table:table-cell table:style-name="ce6"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Processing &amp; Manag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ing large language models for ontology alignment</text:p>
          </table:table-cell>
          <table:table-cell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Ms4OL: Large language models for ontology learning</text:p>
          </table:table-cell>
          <table:table-cell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SW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LAF: An Ontology Learning Applied Framework</text:p>
          </table:table-cell>
          <table:table-cell table:style-name="ce6"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cedia Computer Sci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ala: Ontology matching with large language models</text:p>
          </table:table-cell>
          <table:table-cell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nowledge Capture Conferen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 construction and mapping of multi-source heterogeneous data based on hybrid neural network and autoencoder</text:p>
          </table:table-cell>
          <table:table-cell table:style-name="ce6"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al Computing and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engineering with large language models</text:p>
          </table:table-cell>
          <table:table-cell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ternational Symposium on Symbolic and Numeric Algorithms for Scientific Compu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SD based ontology learning from unstructured text using transformer</text:p>
          </table:table-cell>
          <table:table-cell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dia Computer Sci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deep natural language processing‐based method for ontology learning of project‐specific properties from building information models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uter-Aided Civil and Infrastructure Enginee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language model based framework for new concept placement in ontologies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W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n LLM supported approach to ontology and knowledge graph construction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tional Conference on Bioinformatics and Biomedicin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utomating Hazard-Specific Ontology Construction: Methodological Advancements through Ontology Learning Techniques from Disaster-Related Knowledge Base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and Communication Technologies for Disaster Manag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Onto: An Ontology Construction Approach for Dark Web Community Discussions Through Topic Modeling and Ontology Learning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 Behavior and Emerging Technologi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o LLMs Really Adapt to Domains? An Ontology Learning Perspective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SW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ynamic retrieval augmented generation of ontologies using artificial intelligence (DRAGON-AI)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urnal of Biomedical Semantic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nd-to-End Ontology Learning with Large Language Model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ances in Neural Information Processing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hancing ontology engineering with LLMs: From search to active learning extensions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eedings of Data Mining and Data Wareha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raging language models for generating ontologies of research topics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ur Workshop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everaging LLM for Automated Ontology Extraction and Knowledge Graph Generation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raging LLMs in text-based ontology driven conceptual modeling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Tw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M-based guided generation of ontology term definitions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W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LMs4Life: Large Language Models for Ontology Learning in Life Science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on-GPT: a large language model-powered pipeline for ontology learning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SW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use of large language models to generate capability ontologies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rnational Conference on Emerging Technologies and Factory Autom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chat: a framework for conversational ontology engineering using language models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W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 guided multi-level knowledge graph construction and its applications in blast furnace ironmaking proces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d Engineering Informatic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 Learning from Text: an Analysis on LLM Performance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LP4KGC International Workshop on Natural Language Processing for Knowledge Graph Creation, colocated with Seman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-grounded automatic knowledge graph construction by llm under wikidata schema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hoenixes at LLMs4OL 2024 Tasks A, B, and C: Retrieval Augmented Generation for Ontology Learning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p_nlp at llms4ol 2024 tasks a, b, <text:s/>and c: Ontology learning through prompts with llms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 Conferen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he Artificial Intelligence Ontology: LLM-Assisted Construction of AI Concept Hierarchie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lied ontology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SOTSALearning at LLMs4OL Tasks A and B: Combining rules to Large Language Model for Ontology learning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raging transparent ontology learning to refine constructs in neuroscience</text:p>
          </table:table-cell>
          <table:table-cell office:value-type="string" calcext:value-type="string">
            <text:p>a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roscience Informatic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 Generation using Large Language Model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5" calcext:value-type="float">
            <text:p>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W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 Learning for Hybrid Threat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C: Using common sense knowledge to overcome brittleness and knowledge acquisition bottlenecks</text:p>
          </table:table-cell>
          <table:table-cell office:value-type="string" calcext:value-type="string">
            <text:p>m</text:p>
          </table:table-cell>
          <table:table-cell office:value-type="float" office:value="1985" calcext:value-type="float">
            <text:p>1985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I Magaz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DS: A modelling approach to knowledge engineering</text:p>
          </table:table-cell>
          <table:table-cell office:value-type="string" calcext:value-type="string">
            <text:p>m</text:p>
          </table:table-cell>
          <table:table-cell office:value-type="float" office:value="1992" calcext:value-type="float">
            <text:p>1992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EEE Transactions on Cyberne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ove project towards a common-sense model of the enterprise</text:p>
          </table:table-cell>
          <table:table-cell office:value-type="string" calcext:value-type="string">
            <text:p>m</text:p>
          </table:table-cell>
          <table:table-cell office:value-type="float" office:value="1992" calcext:value-type="float">
            <text:p>199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International Conference on Advanced Technologies for Signal and Image Proc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capture method (IDEF5)</text:p>
          </table:table-cell>
          <table:table-cell office:value-type="string" calcext:value-type="string">
            <text:p>m</text:p>
          </table:table-cell>
          <table:table-cell office:value-type="float" office:value="1994" calcext:value-type="float">
            <text:p>19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uter-Aided Civil and Infrastructure Enginee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linius ontology of ceramic materials</text:p>
          </table:table-cell>
          <table:table-cell office:value-type="string" calcext:value-type="string">
            <text:p>m</text:p>
          </table:table-cell>
          <table:table-cell office:value-type="float" office:value="1994" calcext:value-type="float">
            <text:p>199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national Conference on Knowledge Engineering and Ontology Develop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odology for the design and evaluation of ontologies</text:p>
          </table:table-cell>
          <table:table-cell office:value-type="string" calcext:value-type="string">
            <text:p>m</text:p>
          </table:table-cell>
          <table:table-cell office:value-type="float" office:value="1995" calcext:value-type="float">
            <text:p>1995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European Semantic Web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hysSys ontology for physical systems</text:p>
          </table:table-cell>
          <table:table-cell office:value-type="string" calcext:value-type="string">
            <text:p>m</text:p>
          </table:table-cell>
          <table:table-cell office:value-type="float" office:value="1995" calcext:value-type="float">
            <text:p>199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EEE A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a methodology for building ontologies</text:p>
          </table:table-cell>
          <table:table-cell office:value-type="string" calcext:value-type="string">
            <text:p>m</text:p>
          </table:table-cell>
          <table:table-cell office:value-type="float" office:value="1995" calcext:value-type="float">
            <text:p>19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mmunications of the A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IONS: An ontological methodology for taxonomic knowledge integration</text:p>
          </table:table-cell>
          <table:table-cell office:value-type="string" calcext:value-type="string">
            <text:p>m</text:p>
          </table:table-cell>
          <table:table-cell office:value-type="float" office:value="1996" calcext:value-type="float">
            <text:p>199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orkshop Ontologies and Tex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 distributed use of large-scale ontologies</text:p>
          </table:table-cell>
          <table:table-cell office:value-type="string" calcext:value-type="string">
            <text:p>m</text:p>
          </table:table-cell>
          <table:table-cell office:value-type="float" office:value="1996" calcext:value-type="float">
            <text:p>1996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Workshop on Knowledge Acquisition for Knowledge-Based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ontology: from ontological art towards ontological engineering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Joint International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xical acquisition with WordNet and the Mikrokosmos Ontology</text:p>
          </table:table-cell>
          <table:table-cell office:value-type="string" calcext:value-type="string">
            <text:p>m</text:p>
          </table:table-cell>
          <table:table-cell office:value-type="float" office:value="1998" calcext:value-type="float">
            <text:p>19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sage of WordNet in Natural Language Processing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ontological engineering initiative (KA) 2</text:p>
          </table:table-cell>
          <table:table-cell office:value-type="string" calcext:value-type="string">
            <text:p>m</text:p>
          </table:table-cell>
          <table:table-cell office:value-type="float" office:value="1998" calcext:value-type="float">
            <text:p>19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uter Standards &amp; Interfa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development 101: A guide to creating your first ontology</text:p>
          </table:table-cell>
          <table:table-cell office:value-type="string" calcext:value-type="string">
            <text:p>m</text:p>
          </table:table-cell>
          <table:table-cell office:value-type="float" office:value="2001" calcext:value-type="float">
            <text:p>2001</text:p>
          </table:table-cell>
          <table:table-cell office:value-type="float" office:value="8656" calcext:value-type="float">
            <text:p>8656</text:p>
          </table:table-cell>
          <table:table-cell office:value-type="string" calcext:value-type="string">
            <text:p>International conference on database and expert systems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Xtreme method for developing lightweight ontologies</text:p>
          </table:table-cell>
          <table:table-cell office:value-type="string" calcext:value-type="string">
            <text:p>m</text:p>
          </table:table-cell>
          <table:table-cell office:value-type="float" office:value="2002" calcext:value-type="float">
            <text:p>20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rnational Conference on Business Process Modeling, Development and Sup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-to-knowledge: semantic web-enabled knowledge management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 Intellig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etening wordnet with dolce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A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IGENT: Towards a fine-grained methodology for Distributed, Loosely-controlled and evolvInG Engineering of oNTologies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European Semantic Web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roposal for a unified process for ontology building: UPON</text:p>
          </table:table-cell>
          <table:table-cell office:value-type="string" calcext:value-type="string">
            <text:p>m</text:p>
          </table:table-cell>
          <table:table-cell office:value-type="float" office:value="2005" calcext:value-type="float">
            <text:p>200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cooperatively creating dynamic ontologies</text:p>
          </table:table-cell>
          <table:table-cell office:value-type="string" calcext:value-type="string">
            <text:p>m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pertext and hypermed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a methodology for ontology development in small and medium-sized enterprises</text:p>
          </table:table-cell>
          <table:table-cell office:value-type="string" calcext:value-type="string">
            <text:p>m</text:p>
          </table:table-cell>
          <table:table-cell office:value-type="float" office:value="2005" calcext:value-type="float">
            <text:p>20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AD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-centered ontology engineering: The HCOME methodology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ultimedia Tools and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ethodology for engineering ontology acquisition and validation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processing in agricul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 methodology for ontology-based multi-agent applications (MOMA)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W Sydn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engineering – the DOGMA approach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nternational Conference on Information and Communication Technologies for Disaster Manag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NeOn methodology for ontology engineering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EC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SPL: A method and tool for fact-oriented hybrid ontology engineering</text:p>
          </table:table-cell>
          <table:table-cell office:value-type="string" calcext:value-type="string">
            <text:p>m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st European Conference on Advances in Databases and Information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nded Ontology Methodology - Illustrating the Seed Ontology Creation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 Academy for Information Systems Annual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odologies to build ontologies for terminological purposes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ocedia-Social and Behavioral Scien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MO: yet another methodology for large-scale faceted ontology construction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pplied M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lightweight methodology for rapid ontology engineering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eur Worksh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OD: an agile methodology for the development of ontologies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ur Worksh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ethodology for ontology development in lesson plan domain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hod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ontology-based methodology phases to develop multi-agent system (OmMAS)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tional Conference on Electrical Engineering, Computer Science and Informa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ethodology for a criminal law and procedure ontology for legal question answering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erican Association for Artificial Intellig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Ontology for the Waste Management Domain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ropean Semantic Web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 and development of a biocultural ontology for personalized diabetes self-management of American Indians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dbook on ontolog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e construction of HIV protein ontology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 Conference on Information Systems Enginee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a software centric approach for ontology development: Novel methodology and its application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nowledge Based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e ontologie pour la formalisation et la visualisation des connaissances scientifiques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urnées Francophones d'Ingénierie des Connaissan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agile methodology for ontology development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ral Computing and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 and implementation of e-campus ontology with a hybrid software engineering methodology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ernational Conference on Ubiquitous Information Technologies and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DI: The methodology for ontology development on data integration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ectronics and Mechatronics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T: An industrial oriented ontology engineering framework</text:p>
          </table:table-cell>
          <table:table-cell office:value-type="string" calcext:value-type="string">
            <text:p>m</text:p>
          </table:table-cell>
          <table:table-cell office:value-type="float" office:value="2022" calcext:value-type="float">
            <text:p>20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orkshop on Implemented Ontolog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RA - An ontology for collaborative robotics and adaptation</text:p>
          </table:table-cell>
          <table:table-cell office:value-type="string" calcext:value-type="string">
            <text:p>m</text:p>
          </table:table-cell>
          <table:table-cell office:value-type="float" office:value="2022" calcext:value-type="float">
            <text:p>20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mputers in Indus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tion and application of an ontology-based domain-specific knowledge graph for petroleum exploration and development</text:p>
          </table:table-cell>
          <table:table-cell office:value-type="string" calcext:value-type="string">
            <text:p>m</text:p>
          </table:table-cell>
          <table:table-cell office:value-type="float" office:value="2023" calcext:value-type="float">
            <text:p>20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oscience Fronti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vidO: an ontology for COVID-19 metadata</text:p>
          </table:table-cell>
          <table:table-cell office:value-type="string" calcext:value-type="string">
            <text:p>m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Journal of Supercompu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IA-O: an ontology for anomaly detection and incident management in ICT systems</text:p>
          </table:table-cell>
          <table:table-cell office:value-type="string" calcext:value-type="string">
            <text:p>m</text:p>
          </table:table-cell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pean Semantic Web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ic construction of ontology based on data mining technique</text:p>
          </table:table-cell>
          <table:table-cell office:value-type="string" calcext:value-type="string">
            <text:p>m/a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rnational Congress on Advanced Applied Informa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ic terminology ontology learning based on topic modeling</text:p>
          </table:table-cell>
          <table:table-cell office:value-type="string" calcext:value-type="string">
            <text:p>m/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gineering Applications of Artificial Intellig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a semi-automatic method for building Chinese tax domain ontology</text:p>
          </table:table-cell>
          <table:table-cell office:value-type="string" calcext:value-type="string">
            <text:p>m/a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 Conference on Natural Computation, Fuzzy Systems and Knowledge Discov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emi-automated ontology construction for legal question answering</text:p>
          </table:table-cell>
          <table:table-cell office:value-type="string" calcext:value-type="string">
            <text:p>m/a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w Generation Compu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ed ontology building using deep learning to provide domain-specific knowledge search in the marathi language</text:p>
          </table:table-cell>
          <table:table-cell office:value-type="string" calcext:value-type="string">
            <text:p>m/a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 conference on applied machine lear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SOBUS: Semi-automatic sentiment domain ontology building using synsets</text:p>
          </table:table-cell>
          <table:table-cell office:value-type="string" calcext:value-type="string">
            <text:p>m/a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W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emi-automatic semantic consistency-checking method for learning ontology from relational database</text:p>
          </table:table-cell>
          <table:table-cell office:value-type="string" calcext:value-type="string">
            <text:p>m/a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rm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ic construction method of power safety ontology based on AR-K-means</text:p>
          </table:table-cell>
          <table:table-cell office:value-type="string" calcext:value-type="string">
            <text:p>m/a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tional Conference on Power Electronics, Computer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B-SOBA: Word embeddings-based semi-automatic ontology building for aspect-based sentiment classification</text:p>
          </table:table-cell>
          <table:table-cell office:value-type="string" calcext:value-type="string">
            <text:p>m/a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W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emi-automated method for domain-specific ontology creation from medical guidelines</text:p>
          </table:table-cell>
          <table:table-cell office:value-type="string" calcext:value-type="string">
            <text:p>m/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rnational Conference on Business Process Modeling, Development and Sup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ain knowledge distillation from large language model: An empirical study in the autonomous driving domain</text:p>
          </table:table-cell>
          <table:table-cell office:value-type="string" calcext:value-type="string">
            <text:p>m/a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ternational conference on intelligent transportation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ic Building and Learning of a Multilingual Ontology</text:p>
          </table:table-cell>
          <table:table-cell office:value-type="string" calcext:value-type="string">
            <text:p>m/a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Transactions on Asian and Low-Resource Language Information Proc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ic ontology development framework for building energy data management</text:p>
          </table:table-cell>
          <table:table-cell office:value-type="string" calcext:value-type="string">
            <text:p>m/a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EEE A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Semi-Automatic Approach of Building an Ontology: A Case Study on Material Handling Data</text:p>
          </table:table-cell>
          <table:table-cell office:value-type="string" calcext:value-type="string">
            <text:p>m/a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human experts to machines: An llm supported approach to ontology and knowledge graph construction</text:p>
          </table:table-cell>
          <table:table-cell office:value-type="string" calcext:value-type="string">
            <text:p>m/a</text:p>
          </table:table-cell>
          <table:table-cell office:value-type="float" office:value="2024" calcext:value-type="float">
            <text:p>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human-to LLM-centered collaborative ontology engineering</text:p>
          </table:table-cell>
          <table:table-cell office:value-type="string" calcext:value-type="string">
            <text:p>m/a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lied ont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e Language Model for Ontology Learning in Drinking Water Distribution Network Domain</text:p>
          </table:table-cell>
          <table:table-cell office:value-type="string" calcext:value-type="string">
            <text:p>m/a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ur Worksh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emi-Automatic Ontology Development Framework for Knowledge Transformation of Construction Safety Requirements</text:p>
          </table:table-cell>
          <table:table-cell office:value-type="string" calcext:value-type="string">
            <text:p>m/a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ting Reliable Adverse event Profiles for Health through Automated Integrated Data (GRAPH-AID): A Semi-Automated Ontology Building Approach</text:p>
          </table:table-cell>
          <table:table-cell office:value-type="string" calcext:value-type="string">
            <text:p>m/a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ipeline for Ontology Construction Using a Large Language Model: A Smart Campus Use Case</text:p>
          </table:table-cell>
          <table:table-cell table:style-name="ce6" office:value-type="string" calcext:value-type="string">
            <text:p>m/a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tional Conference on Enterprise Information Systems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evie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Automatic Ontology Generation: State of the Art</text:p>
          </table:table-cell>
          <table:table-cell table:style-name="ce6" office:value-type="string" calcext:value-type="string">
            <text:p>a</text:p>
          </table:table-cell>
          <table:table-cell office:value-type="float" office:value="2007" calcext:value-type="float">
            <text:p>200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ternational Conference on Advanced Intelligent Systems and Informatic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 survey of ontology learning techniques and applications</text:p>
          </table:table-cell>
          <table:table-cell table:style-name="ce6" office:value-type="string" calcext:value-type="string">
            <text:p>a</text:p>
          </table:table-cell>
          <table:table-cell office:value-type="float" office:value="2018" calcext:value-type="float">
            <text:p>201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nternational Conference on Data Mining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utomatic ontology construction from text: a review from shallow to deep learning trend</text:p>
          </table:table-cell>
          <table:table-cell table:style-name="ce6" office:value-type="string" calcext:value-type="string">
            <text:p>a</text:p>
          </table:table-cell>
          <table:table-cell office:value-type="float" office:value="2020" calcext:value-type="float">
            <text:p>20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dvanced Engineering Informatic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 learning: Grand tour and challenges</text:p>
          </table:table-cell>
          <table:table-cell table:style-name="ce6"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WAT4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ystematic literature review of automatic ontology construction</text:p>
          </table:table-cell>
          <table:table-cell office:value-type="string" calcext:value-type="string">
            <text:p>a</text:p>
          </table:table-cell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ernational conference on web intellig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ledge Graph and Deep Learning Assisted Question Answering and Ontology Construction: A Survey</text:p>
          </table:table-cell>
          <table:table-cell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tional Conference on Semantic System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 learning from relational database: a review</text:p>
          </table:table-cell>
          <table:table-cell table:style-name="ce6"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rnational Conference on Natural Computation, Fuzzy Systems and Knowledge Discovery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 Review of State of the Art Deep Learning Models for Ontology Construction</text:p>
          </table:table-cell>
          <table:table-cell table:style-name="ce6"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JC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hort review for ontology learning: Stride to large language models trend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duría y administració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ing machine learning and ontology: A systematic literature review</text:p>
          </table:table-cell>
          <table:table-cell office:value-type="string" calcext:value-type="string">
            <text:p>a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 ED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ep learning-driven ontology learning: A systematic mapping study</text:p>
          </table:table-cell>
          <table:table-cell office:value-type="string" calcext:value-type="string">
            <text:p>a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ology and Applied Science Research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ntology learning towards expressiveness: A survey</text:p>
          </table:table-cell>
          <table:table-cell table:style-name="ce6" office:value-type="string" calcext:value-type="string">
            <text:p>a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shop on Knowledge Discovery for Ontolog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view and analysis of methodologies for building ontologies</text:p>
          </table:table-cell>
          <table:table-cell office:value-type="string" calcext:value-type="string">
            <text:p>m</text:p>
          </table:table-cell>
          <table:table-cell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I3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odologies for Ontology Development</text:p>
          </table:table-cell>
          <table:table-cell office:value-type="string" calcext:value-type="string">
            <text:p>m</text:p>
          </table:table-cell>
          <table:table-cell office:value-type="float" office:value="2007" calcext:value-type="float">
            <text:p>2007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Procedia computer sci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-friendly ontology creation methodologies – A survey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urnal of the American society for information science and techn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urvey on ontology construction methodologies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ternational Journal of Computer Application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n Analysis of Ontology Engineering Methodologies: A Literature Review</text:p>
          </table:table-cell>
          <table:table-cell table:style-name="ce6"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dvances in Neural Information Processing System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 Critical Analysis of lifecycles and Methods for Ontology Construction and Evaluation</text:p>
          </table:table-cell>
          <table:table-cell table:style-name="ce6"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ledge Capture Con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tive analysis of methodologies for domain ontology development: A systematic review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ternational Journal of Advanced Computer Science and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bibliometric analysis of automatic and semi-automatic ontology construction processes</text:p>
          </table:table-cell>
          <table:table-cell office:value-type="string" calcext:value-type="string">
            <text:p>m/a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nals of Library and Information Studi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arge Language Models for Ontology Engineering: A Systematic Literature </text:p>
          </table:table-cell>
          <table:table-cell table:style-name="ce6" office:value-type="string" calcext:value-type="string">
            <text:p>m/a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A Annual Symposium proceedings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Outdated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Automatic acquisition of hyponyms from large text corpora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Dublin core and metadata for e-Communit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orpus-based conceptual clustering method for verb frames and ontology acquisition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IJC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E: A linguistics-based tool for the building of a domain ontology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ulti-Science Jour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ain-specific knowledge acquisition using WordNet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nal of Big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ethod for semi-automatic ontology acquisition from a corporate intranet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ernational Conference on Management of Digital Eco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ppering knowledge sources with SALT: Boosting conceptual content for ontology generation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ternational Journal on Semantic Web and Information System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 language learning support system using course-centered ontology and its evaluation</text:p>
          </table:table-cell>
          <table:table-cell table:style-name="ce6"/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mputers &amp; Edu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OWL ontologies from free texts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rnational Journal of Intelligent Engineering and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UML to ready-to-use OWL ontologies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 Journal of Supercompu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cooperatively creating dynamic ontologies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rnational Conference on Bioinformatics and Biomedic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ic construction of topic ontology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C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ng ontological knowledge from domain-specific text documents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ternational Conference on Database and Expert Systems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concept hierarchies from text with a guided agglomerative clustering algorithm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orkshop on Ontologies in Agent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supervised learning of semantic relations between concepts of a molecular biology ontology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nternational Journal of Information and Communication Techn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ontology from relational database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nternational Conference on Quality Softw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odology to build medical ontology from textual resources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ernational conference on web intellig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 of the automatic ontology building system about the specific domain knowledge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urnal of Systems and Softwa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n Incremental and FCA-based Ontology Construction Method for Semantics-based Component Retrieval</text:p>
          </table:table-cell>
          <table:table-cell table:style-name="ce6"/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tificial Intelligence Revi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quisition of OWL DL axioms from lexical resources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nternational Journal of System Assurance Engineering and Managemen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 knowledge acquisition methodology to ontology construction for information retrieval from medical documents</text:p>
          </table:table-cell>
          <table:table-cell table:style-name="ce6"/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urnal Ilmu Komputer dan Informa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OntoEx: Automatic ontology construction from natural English text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nternational Conference on Computational Intelligence and Its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learning and population: bridging the gap between text and knowledge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niversity of Versail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learning from text based on multi-word term concepts: the ontogain method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ory and applications of ontology: Computer application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emi-Automatic Domain Ontology Creation from Text Resources</text:p>
          </table:table-cell>
          <table:table-cell table:style-name="ce6"/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ience Journal of University of Zakh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supervised ontology acquisition from plain texts: the OntoGain system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ternational Conference Advanced Communication Techn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CTOL: A semantic-based domain ontology learning system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Journal of King Saud University-Computer and Information Scien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hybrid method for domain ontology construction from the web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ttern Recognition and Image 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learning ontology from relational schema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ied ont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xont: A semi-automatic ontology creation tool for programmable web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national conference on intelligent transportation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web resources to agricultural ontology: a method for semi-automatic construction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urnal of Biomedical Seman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learning from text: A look back and into the future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inductive logic programming-based approach for ontology population from the web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ta Mining and Data Wareha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 migration method of rdb to ontology while keeping semantics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ethodology and intermediate layer for the automatic creation of ontology instances stored in relational databases</text:p>
          </table:table-cell>
          <table:table-cell table:style-name="ce6"/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urnal of Web Seman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 maps as the first step in an ontology construction method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formation Processing &amp; Manag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orpus-based conceptual clustering method for verb frames and ontology acquisition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rnational Conference on Cognitive Informatics &amp; Cognitive Compu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DB2RDF: completed transformation from relational database into RDF ontology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Xiv pre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unsupervised ontology learning from data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ificial Intelligence Applications and Innov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odologies to build ontologies for terminological purposes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nowledge and Information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construction from text: challenges and trends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nowledge acquis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pping XML to OWL ontologies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usiness Review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Not acces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tology Learning in the Deep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uropean knowledge acquisition worksh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y construction based on deep learning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national Conference on Ubiquitous Information Technologies and 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new automatic ontology construction method based on machine learning techniques: application on financial corpus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national Conference on Management of Digital Eco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2Construct: an automatic ontology construction based on LDA from texual data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national Conference on Management of Digital Eco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ng LLMs in the Engineering of a SAR Ontology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national Conference on Artificial Intelligence Applications and Innov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M-driven ontology learning to augment student performance analysis in higher education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 Conference on Knowledge Science, Engineering and Manag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LLM centred framework for ontology generation in urban planning domain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phes de connaissances et Ontologies: de l'Apprentissage à l'Exploitation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41:Sheet1.E161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4:57:31.748143270</meta:creation-date>
    <dc:date>2025-10-24T13:10:37.121887797</dc:date>
    <meta:editing-duration>P1DT2H59M34S</meta:editing-duration>
    <meta:editing-cycles>50</meta:editing-cycles>
    <meta:generator>LibreOffice/7.3.7.2$Linux_X86_64 LibreOffice_project/30$Build-2</meta:generator>
    <meta:document-statistic meta:table-count="1" meta:cell-count="984" meta:object-count="0"/>
  </office:meta>
</office:document-meta>
</file>