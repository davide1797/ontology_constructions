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# selected per year</text:p>
          </table:table-cell>
          <table:table-cell table:number-columns-repeated="2"/>
          <table:table-cell office:value-type="string" calcext:value-type="string">
            <text:p># manual selected per year</text:p>
          </table:table-cell>
          <table:table-cell table:number-columns-repeated="2"/>
          <table:table-cell office:value-type="string" calcext:value-type="string">
            <text:p>#semi-automatic selected per year</text:p>
          </table:table-cell>
          <table:table-cell table:number-columns-repeated="2"/>
          <table:table-cell office:value-type="string" calcext:value-type="string">
            <text:p># automatic selected per year</text:p>
          </table:table-cell>
          <table:table-cell table:number-columns-repeated="2"/>
          <table:table-cell office:value-type="string" calcext:value-type="string">
            <text:p>#citations for manual per year</text:p>
          </table:table-cell>
          <table:table-cell table:number-columns-repeated="2"/>
          <table:table-cell office:value-type="string" calcext:value-type="string">
            <text:p>#citations for semi-automatic per year</text:p>
          </table:table-cell>
          <table:table-cell table:number-columns-repeated="2"/>
          <table:table-cell office:value-type="string" calcext:value-type="string">
            <text:p># citations for automatic per year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801" calcext:value-type="float">
            <text:p>180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4749" calcext:value-type="float">
            <text:p>4749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1229" calcext:value-type="float">
            <text:p>1229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3048" calcext:value-type="float">
            <text:p>3048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8656" calcext:value-type="float">
            <text:p>8656</text:p>
          </table:table-cell>
          <table:table-cell/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2:.H9])" office:value-type="float" office:value="20" calcext:value-type="float">
            <text:p>20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SUM([.Q2:.Q9])" office:value-type="float" office:value="341" calcext:value-type="float">
            <text:p>341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511" calcext:value-type="float">
            <text:p>511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K2:.K11])" office:value-type="float" office:value="71" calcext:value-type="float">
            <text:p>7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477" calcext:value-type="float">
            <text:p>477</text:p>
          </table:table-cell>
          <table:table-cell table:number-columns-repeated="5"/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005" calcext:value-type="float">
            <text:p>2005</text:p>
          </table:table-cell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006" calcext:value-type="float">
            <text:p>2006</text:p>
          </table:table-cell>
          <table:table-cell office:value-type="float" office:value="322" calcext:value-type="float">
            <text:p>32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009" calcext:value-type="float">
            <text:p>2009</text:p>
          </table:table-cell>
          <table:table-cell office:value-type="float" office:value="297" calcext:value-type="float">
            <text:p>297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011" calcext:value-type="float">
            <text:p>2011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015" calcext:value-type="float">
            <text:p>2015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016" calcext:value-type="float">
            <text:p>2016</text:p>
          </table:table-cell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019" calcext:value-type="float">
            <text:p>2019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023" calcext:value-type="float">
            <text:p>2023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024" calcext:value-type="float">
            <text:p>2024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SUM([.E2:.E25])" office:value-type="float" office:value="48" calcext:value-type="float">
            <text:p>48</text:p>
          </table:table-cell>
          <table:table-cell table:number-columns-repeated="8"/>
          <table:table-cell office:value-type="float" office:value="23841" calcext:value-type="float">
            <text:p>23841</text:p>
          </table:table-cell>
          <table:table-cell table:number-columns-repeated="6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/>
          <table:table-cell table:formula="of:=SUM([.B2:.B28])" office:value-type="float" office:value="139" calcext:value-type="float">
            <text:p>139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venues</text:p>
          </table:table-cell>
          <table:table-cell table:number-columns-repeated="4"/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Xiv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WC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eur Workshop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W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cedia Computer Scienc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plied ontolog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EEE Access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SWC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en Conferenc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AI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CI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formation processing in agricultur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PMD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CT-D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T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EEE/WIC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urnal of Web Semantic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timedia Tools and Application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ural Computing and Application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Journal of Supercomputin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M Transactions on Asian and Low-Resource Language Information Processin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vanced Engineering Informatic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vances in Neural Information Processing System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I Magazine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erican Association for Artificial Intelligence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pplied Math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MC bioinformatic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munications of the ACM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puter Standards &amp; Interfac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puters in Industry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currency and Computation: Practice and Experience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ast European Conference on Advances in Databases and Information System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AI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tronics and Mechatronics Conference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gineering Applications of Artificial Intelligence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gineering, Technology &amp; Applied Science Research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ormal Ontology in Information System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oscience Frontier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andbook on ontologi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uman Behavior and Emerging Technologi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ypertext and hypermedia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ADI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EEE Transactions on Cybernetic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ormation Processing &amp; Management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ormation Scienc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lligent Systems in Big Data, Semantic Web and Machine Learning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national Conference on Advanced Technologies for Signal and Image Processing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national conference on applied machine learning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national Conference on Bioinformatics and Biomedicine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national Conference on Computational Intelligence and Its Application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national conference on database and expert systems application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national Conference on Electrical Engineering, Computer Science and Informatic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national Conference on Emerging Technologies and Factory Automation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national Conference on Enterprise Information System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national Conference on Information Systems Engineering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national conference on intelligent transportation system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national Conference on Knowledge Engineering and Ontology Development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national Conference on Natural Computation, Fuzzy Systems and Knowledge Discovery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national Conference on Power Electronics, Computer Application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national Conference on Web Intelligence and Intelligent Agent Technology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national Congress on Advanced Applied Informatic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national IOT, Electronics and Mechatronics Conference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national Symposium on Innovative Approaches in Smart Technologi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national Symposium on Symbolic and Numeric Algorithms for Scientific Computing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int International Conference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urnal of Big Data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urnal of Biomedical Semantic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urnal of Computer Information Systems and Industrial Management Application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urnal of information science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urnal of Systems and Software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urnées Francophones d'Ingénierie des Connaissanc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RC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urnal Ilmu Komputer dan Informasi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EOD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owledge Based System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owledge Capture Conference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thodology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bile Information System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uroscience Informatic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Generation Computing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LP4KGC International Workshop on Natural Language Processing for Knowledge Graph Creation, colocated with Semantic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dia-Social and Behavioral Scienc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edings of Data Mining and Data Warehaus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conciling Data Analytics, Automation, Privacy, and Security: A Big Data Challenge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AT4L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ansactions on Cybernetic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K Academy for Information Systems Annual Conference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style-name="ce1"/>
          <table:table-cell/>
        </table:table-row>
        <table:table-row table:style-name="ro1">
          <table:table-cell office:value-type="string" calcext:value-type="string">
            <text:p>University of Twente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style-name="ce1"/>
          <table:table-cell/>
        </table:table-row>
        <table:table-row table:style-name="ro1">
          <table:table-cell office:value-type="string" calcext:value-type="string">
            <text:p>UNSW Sydney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style-name="ce1"/>
          <table:table-cell/>
        </table:table-row>
        <table:table-row table:style-name="ro1">
          <table:table-cell office:value-type="string" calcext:value-type="string">
            <text:p>Usage of WordNet in Natural Language Processing Systems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style-name="ce1"/>
          <table:table-cell/>
        </table:table-row>
        <table:table-row table:style-name="ro1">
          <table:table-cell office:value-type="string" calcext:value-type="string">
            <text:p>Web Intelligence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style-name="ce1"/>
          <table:table-cell/>
        </table:table-row>
        <table:table-row table:style-name="ro1">
          <table:table-cell office:value-type="string" calcext:value-type="string">
            <text:p>Workshop on Implemented Ontologies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style-name="ce1"/>
          <table:table-cell/>
        </table:table-row>
        <table:table-row table:style-name="ro1">
          <table:table-cell office:value-type="string" calcext:value-type="string">
            <text:p>Workshop on Knowledge Acquisition for Knowledge-Based Systems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style-name="ce1"/>
          <table:table-cell/>
        </table:table-row>
        <table:table-row table:style-name="ro1">
          <table:table-cell office:value-type="string" calcext:value-type="string">
            <text:p>Workshop Ontologies and Text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style-name="ce1"/>
          <table:table-cell/>
        </table:table-row>
        <table:table-row table:style-name="ro1" table:number-rows-repeated="6">
          <table:table-cell table:number-columns-repeated="18"/>
          <table:table-cell table:style-name="ce1"/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801" calcext:value-type="float">
            <text:p>18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4749" calcext:value-type="float">
            <text:p>47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1229" calcext:value-type="float">
            <text:p>12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3048" calcext:value-type="float">
            <text:p>3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8656" calcext:value-type="float">
            <text:p>86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687" calcext:value-type="float">
            <text:p>6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16" calcext:value-type="float">
            <text:p>1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float" office:value="271" calcext:value-type="float">
            <text:p>271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364" calcext:value-type="float">
            <text:p>364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float" office:value="43" calcext:value-type="float">
            <text:p>43</text:p>
          </table:table-cell>
          <table:table-cell office:value-type="float" office:value="104" calcext:value-type="float">
            <text:p>104</text:p>
          </table:table-cell>
          <table:table-cell office:value-type="float" office:value="290" calcext:value-type="float">
            <text:p>29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6:10:41.235203033</meta:creation-date>
    <dc:date>2025-11-30T17:40:36.625417700</dc:date>
    <meta:editing-duration>PT2H18M30S</meta:editing-duration>
    <meta:editing-cycles>10</meta:editing-cycles>
    <meta:generator>LibreOffice/7.3.7.2$Linux_X86_64 LibreOffice_project/30$Build-2</meta:generator>
    <meta:document-statistic meta:table-count="1" meta:cell-count="693" meta:object-count="0"/>
  </office:meta>
</office:document-meta>
</file>